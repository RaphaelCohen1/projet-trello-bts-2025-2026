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ea0" officeooo:paragraph-rsid="00014ea0"/>
    </style:style>
    <style:style style:name="P2" style:family="paragraph" style:parent-style-name="Standard">
      <style:text-properties officeooo:rsid="0001ce65" officeooo:paragraph-rsid="0001ce65"/>
    </style:style>
    <style:style style:name="P3" style:family="paragraph" style:parent-style-name="Standard">
      <style:text-properties officeooo:rsid="0001ce65" officeooo:paragraph-rsid="00083f4b"/>
    </style:style>
    <style:style style:name="P4" style:family="paragraph" style:parent-style-name="Standard">
      <style:text-properties officeooo:rsid="00083f4b" officeooo:paragraph-rsid="00083f4b"/>
    </style:style>
    <style:style style:name="P5" style:family="paragraph" style:parent-style-name="Standard">
      <style:text-properties officeooo:rsid="000afe6c" officeooo:paragraph-rsid="000afe6c"/>
    </style:style>
    <style:style style:name="P6" style:family="paragraph" style:parent-style-name="Standard">
      <style:text-properties officeooo:rsid="0001ce65" officeooo:paragraph-rsid="0001ce65"/>
    </style:style>
    <style:style style:name="T1" style:family="text">
      <style:text-properties officeooo:rsid="0001ce65"/>
    </style:style>
    <style:style style:name="T2" style:family="text">
      <style:text-properties officeooo:rsid="00083f4b"/>
    </style:style>
    <style:style style:name="T3" style:family="text">
      <style:text-properties officeooo:rsid="001a9f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E5 :</text:p>
      <text:p text:style-name="P1">Se présenter</text:p>
      <text:p text:style-name="P1">Présentation de l’entreprise</text:p>
      <text:p text:style-name="P1">Qu’avons-nous fait en entreprise ?</text:p>
      <text:p text:style-name="P2">10 minutes de présentation</text:p>
      <text:p text:style-name="P2">Expliquer les taches faites dans l’entreprise</text:p>
      <text:p text:style-name="P4">IL FAUT DEUX EXEMPLAIRES DE CHAQUE</text:p>
      <text:p text:style-name="P2">Dossier E5 composer : - Une page de garde </text:p>
      <text:p text:style-name="P2"><text:s text:c="38"/>- tableau de synthèse</text:p>
      <text:p text:style-name="P2">- Attestation de présence en entreprise</text:p>
      <text:p text:style-name="P2"/>
      <text:p text:style-name="P2">Tableau de synthèse des missions : </text:p>
      <text:p text:style-name="P2">- <text:span text:style-name="T3">dans les « Réalisations professionnel » mettre des intitulés de projet réel et non des codes créer il faut que ce soit des nom de réalisations, des intitulés de missions. Ex : si c un code de formulaire, dire que tu as fait un formulaire mais pas avoir fait des &lt;form&gt; ou des boucles JS….</text:span></text:p>
      <text:p text:style-name="P2">- Entreprise : 1 ligne</text:p>
      <text:p text:style-name="P2">- Certification : MOOC de l’Annecy</text:p>
      <text:p text:style-name="P2"/>
      <text:p text:style-name="P2"/>
      <text:p text:style-name="P3">SLAM : <text:span text:style-name="T2">1 Client léger ; 1 </text:span>Client lourd.</text:p>
      <text:p text:style-name="P4">Client léger : site, application web qui tourne sur une base de donnée</text:p>
      <text:p text:style-name="P3"/>
      <text:p text:style-name="P3"/>
      <text:p text:style-name="P3">Client lourd : python ; <text:span text:style-name="T2">une application d’outil de gestion de stock</text:span></text:p>
      <text:p text:style-name="P3"/>
      <text:p text:style-name="P3"/>
      <text:p text:style-name="P4">E6 : <text:span text:style-name="T1">- Une page de garde</text:span></text:p>
      <text:p text:style-name="P3"><text:s text:c="8"/>- <text:span text:style-name="T2">Fiche mission 1</text:span></text:p>
      <text:p text:style-name="P3"><text:s text:c="8"/>- <text:span text:style-name="T2">Fiche mission 2</text:span></text:p>
      <text:p text:style-name="P4"/>
      <text:p text:style-name="P4">30 minutes : préparation</text:p>
      <text:p text:style-name="P4">20 minutes : oral 1</text:p>
      <text:p text:style-name="P4">1 heure : prépa PC : coder</text:p>
      <text:p text:style-name="P4">20 minutes : oral recette</text:p>
      <text:p text:style-name="P4"/>
      <text:p text:style-name="P5">Veille 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09:30:33.595000000</meta:creation-date>
    <dc:date>2025-03-06T12:29:43.651000000</dc:date>
    <meta:editing-duration>PT4H12M36S</meta:editing-duration>
    <meta:editing-cycles>8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5" meta:word-count="192" meta:character-count="1057" meta:non-whitespace-character-count="833"/>
  </office:meta>
</office:document-meta>
</file>