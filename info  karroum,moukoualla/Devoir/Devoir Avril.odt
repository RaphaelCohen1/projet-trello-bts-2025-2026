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E000002005CE871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16261a" officeooo:paragraph-rsid="0016261a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20pt" fo:font-style="italic" style:text-underline-style="solid" style:text-underline-width="auto" style:text-underline-color="font-color" officeooo:rsid="0016261a" officeooo:paragraph-rsid="0016261a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20pt" fo:font-style="normal" style:text-underline-style="none" officeooo:rsid="0016261a" officeooo:paragraph-rsid="0016261a" style:font-size-asian="20pt" style:font-style-asian="normal" style:font-size-complex="20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capitulatif de le mise en place de mon TP</text:p>
      <text:p text:style-name="P1"/>
      <text:p text:style-name="P2">Sur Debian</text:p>
      <text:p text:style-name="P2"/>
      <text:p text:style-name="P3">Dans le terminal :</text:p>
      <text:p text:style-name="P3">J’ai entrer les commande afin d’installer Wireshark</text:p>
      <text:p text:style-name="P3"/>
      <text:p text:style-name="P3">Une fois installer, je configure les permissions pour Wireshark</text:p>
      <text:p text:style-name="P3"/>
      <text:p text:style-name="P3">Je lance Wireshark </text:p>
      <text:p text:style-name="P3"/>
      <text:p text:style-name="P3"/>
      <text:p text:style-name="P3"><draw:frame draw:style-name="fr1" draw:name="Image1" text:anchor-type="char" svg:width="17cm" svg:height="7.675cm" draw:z-index="0"><draw:image xlink:href="Pictures/100000010000046E000002005CE871E5.png" xlink:type="simple" xlink:show="embed" xlink:actuate="onLoad" draw:mime-type="image/png"/></draw:frame><text:s text:c="102"/></text:p>
      <text:p text:style-name="P3"><draw:frame draw:style-name="fr1" draw:name="Image2" text:anchor-type="char" svg:width="17cm" svg:height="7.675cm" draw:z-index="1"><draw:image xlink:href="Pictures/100000010000046E000002005CE871E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21:07:59.237000000</meta:creation-date>
    <dc:date>2025-05-04T21:32:14.456000000</dc:date>
    <meta:editing-duration>PT24M16S</meta:editing-duration>
    <meta:editing-cycles>1</meta:editing-cycles>
    <meta:document-statistic meta:table-count="0" meta:image-count="2" meta:object-count="0" meta:page-count="2" meta:paragraph-count="7" meta:word-count="34" meta:character-count="306" meta:non-whitespace-character-count="175"/>
    <meta:generator>LibreOffice/7.6.4.1$Windows_X86_64 LibreOffice_project/e19e193f88cd6c0525a17fb7a176ed8e6a3e2aa1</meta:generator>
  </office:meta>
</office:document-meta>
</file>