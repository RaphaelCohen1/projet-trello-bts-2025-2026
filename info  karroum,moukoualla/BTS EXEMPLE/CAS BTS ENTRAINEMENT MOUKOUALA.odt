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199d" officeooo:paragraph-rsid="0006199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dfe6" officeooo:paragraph-rsid="0007dfe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1a8a" officeooo:paragraph-rsid="00131a8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578f1" officeooo:paragraph-rsid="001578f1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a721e" officeooo:paragraph-rsid="001a721e"/>
    </style:style>
    <style:style style:name="P6" style:family="paragraph" style:parent-style-name="Standard">
      <style:paragraph-properties fo:text-align="justify" style:justify-single-word="false"/>
      <style:text-properties officeooo:paragraph-rsid="002c8393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7dfe6" officeooo:paragraph-rsid="0007dfe6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355c9" officeooo:paragraph-rsid="001355c9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578f1" officeooo:paragraph-rsid="001578f1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1720da" officeooo:paragraph-rsid="001720da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1de1b3" officeooo:paragraph-rsid="001de1b3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1de1b3" officeooo:paragraph-rsid="0036f1f5"/>
    </style:style>
    <style:style style:name="T1" style:family="text">
      <style:text-properties officeooo:rsid="001578f1"/>
    </style:style>
    <style:style style:name="T2" style:family="text">
      <style:text-properties officeooo:rsid="0016cb0d"/>
    </style:style>
    <style:style style:name="T3" style:family="text">
      <style:text-properties style:text-underline-style="none" officeooo:rsid="001de1b3"/>
    </style:style>
    <style:style style:name="T4" style:family="text">
      <style:text-properties style:text-underline-style="none" officeooo:rsid="002c8393"/>
    </style:style>
    <style:style style:name="T5" style:family="text">
      <style:text-properties officeooo:rsid="00269cd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69cde"/>
    </style:style>
    <style:style style:name="T8" style:family="text">
      <style:text-properties style:text-underline-style="solid" style:text-underline-width="auto" style:text-underline-color="font-color" officeooo:rsid="0030614b"/>
    </style:style>
    <style:style style:name="T9" style:family="text">
      <style:text-properties officeooo:rsid="002c8393"/>
    </style:style>
    <style:style style:name="T10" style:family="text">
      <style:text-properties officeooo:rsid="0033f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TS CAS GSIC</text:p>
      <text:p text:style-name="P3">correction</text:p>
      <text:p text:style-name="P2">Dossier A</text:p>
      <text:p text:style-name="P5">Mission A1</text:p>
      <text:p text:style-name="P2">Question A1.1 </text:p>
      <text:p text:style-name="P7">Répondre au obligation concernant la traçabilité et réaliser les audites.</text:p>
      <text:p text:style-name="P2">Question A1.2 </text:p>
      <text:p text:style-name="P8">a) <text:span text:style-name="T1">L’objectif est réglementaire</text:span></text:p>
      <text:p text:style-name="P9">b) <text:span text:style-name="T2">pour garder une trace, au ses du rgpd la trace reste à 6 mois </text:span></text:p>
      <text:p text:style-name="P4">Question A1.3 </text:p>
      <text:p text:style-name="P10">Confidentialité oui car chiffremment avant enregistrement</text:p>
      <text:p text:style-name="P10">Pas garantie car pas de hash </text:p>
      <text:p text:style-name="P10"/>
      <text:p text:style-name="P5">Mission A2</text:p>
      <text:p text:style-name="P5">Question A2.1 </text:p>
      <text:p text:style-name="P5"/>
      <text:p text:style-name="P6"><text:span text:style-name="T3">CREATE VIEW v_liste_comptes</text:span><text:span text:style-name="T4">(</text:span>origine, nom, prenom, compte_login, roles <text:span text:style-name="T9">)</text:span><text:span text:style-name="T3"> (voir document A2) </text:span></text:p>
      <text:p text:style-name="P11"/>
      <text:p text:style-name="P12"><text:span text:style-name="T6">Question A2.</text:span><text:span text:style-name="T8">2</text:span></text:p>
      <text:p text:style-name="P12"><text:span text:style-name="T10">sur le document</text:span>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09:00:49.149000000</meta:creation-date>
    <dc:date>2025-04-24T10:10:09.205000000</dc:date>
    <meta:editing-duration>PT1H9M13S</meta:editing-duration>
    <meta:editing-cycles>18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75" meta:character-count="482" meta:non-whitespace-character-count="416"/>
  </office:meta>
</office:document-meta>
</file>