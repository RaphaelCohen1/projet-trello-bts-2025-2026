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57d" officeooo:paragraph-rsid="0016e57d"/>
    </style:style>
    <style:style style:name="P2" style:family="paragraph" style:parent-style-name="Standard">
      <style:text-properties officeooo:rsid="001ac7fd" officeooo:paragraph-rsid="001ac7fd"/>
    </style:style>
    <style:style style:name="P3" style:family="paragraph" style:parent-style-name="Standard">
      <style:text-properties officeooo:rsid="001edb35" officeooo:paragraph-rsid="001edb35"/>
    </style:style>
    <style:style style:name="T1" style:family="text">
      <style:text-properties officeooo:rsid="00176c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<text:span text:style-name="T1">A2.2 :</text:span></text:p>
      <text:p text:style-name="P1"/>
      <text:p text:style-name="P2">public boolean modifierMdp (String valMdp) {</text:p>
      <text:p text:style-name="P2"><text:s text:c="5"/>this.ancienMdp = ancienMdp ;</text:p>
      <text:p text:style-name="P2"><text:s text:c="5"/>this.valMdp = valMdp ;</text:p>
      <text:p text:style-name="P2">}</text:p>
      <text:p text:style-name="P2"/>
      <text:p text:style-name="P2">/*Dans les dossier que l’on me donne l’elément clef est les class métier</text:p>
      <text:p text:style-name="P2"><text:s text:c="3"/>dans la class métier ya un module qui crée un mdp </text:p>
      <text:p text:style-name="P2"><text:s text:c="3"/>j’appelle cette class. Le fait que la fonction « ModifierMdp » ne prend qu’un élément, nous indique que on n’a pas besoin de la date et nous indique que l’on aura besoin de la méthode « créationdeMdp »</text:p>
      <text:p text:style-name="P2">*/</text:p>
      <text:p text:style-name="P2"/>
      <text:p text:style-name="P2">Question A1.1 :</text:p>
      <text:p text:style-name="P2"/>
      <text:p text:style-name="P2">public Utilisateur…..*/</text:p>
      <text:p text:style-name="P2">aucune méthode ne doit avoir de majuscules !!!!!!!!! Donc c’est forcément de là où est le problème .</text:p>
      <text:p text:style-name="P2"/>
      <text:p text:style-name="P2"/>
      <text:p text:style-name="P2">Question C1.1 :</text:p>
      <text:p text:style-name="P2">generation d’un Token unique. Ils ont prévu un token unique pour ce protégé de cette attaque</text:p>
      <text:p text:style-name="P2"/>
      <text:p text:style-name="P2"/>
      <text:p text:style-name="P3">Question C.2 :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7:20:51.407000000</meta:creation-date>
    <dc:date>2025-04-03T18:10:32.629000000</dc:date>
    <meta:editing-duration>PT49M42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5" meta:word-count="126" meta:character-count="710" meta:non-whitespace-character-count="582"/>
  </office:meta>
</office:document-meta>
</file>